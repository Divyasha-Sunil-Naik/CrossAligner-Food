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napurna SIL" svg:font-family="'Annapurna SIL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3.5055in"/>
    </style:style>
    <style:style style:name="co3" style:family="table-column">
      <style:table-column-properties fo:break-before="auto" style:column-width="3.1098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8252in"/>
    </style:style>
    <style:style style:name="co6" style:family="table-column">
      <style:table-column-properties fo:break-before="auto" style:column-width="0.926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7252in" fo:break-before="auto" style:use-optimal-row-height="false"/>
    </style:style>
    <style:style style:name="ro2" style:family="table-row">
      <style:table-row-properties style:row-height="1.4827in" fo:break-before="auto" style:use-optimal-row-height="false"/>
    </style:style>
    <style:style style:name="ro3" style:family="table-row">
      <style:table-row-properties style:row-height="2.8063in" fo:break-before="auto" style:use-optimal-row-height="false"/>
    </style:style>
    <style:style style:name="ro4" style:family="table-row">
      <style:table-row-properties style:row-height="1.14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ef3f3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Annapurna SI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font-name="Annapurna SIL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ext-properties style:font-name="Annapurna SIL" fo:font-size="10pt" style:font-size-asian="10pt" style:font-size-complex="10pt"/>
    </style:style>
    <style:style style:name="ce16" style:family="table-cell" style:parent-style-name="Default">
      <style:table-cell-properties fo:background-color="#fef3f3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style:font-name="Annapurna SI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font-name="Annapurna SI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font-name="Annapurna SI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font-name="Annapurna SIL" fo:font-size="10pt" style:font-size-asian="10pt" style:font-size-complex="10pt"/>
    </style:style>
    <style:style style:name="ce2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nnapurna SIL" fo:font-size="10pt" style:font-size-asian="10pt" style:font-size-complex="10pt"/>
    </style:style>
    <style:style style:name="T1" style:family="text">
      <style:text-properties fo:color="#000000" style:font-name="Annapurna SI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nnapurna SI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style:font-name="Annapurna SI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number-columns-repeated="2" table:default-cell-style-name="ce5"/>
        <table:table-column table:style-name="co7" table:number-columns-repeated="8" table:default-cell-style-name="Default"/>
        <table:table-column table:style-name="co7" table:number-columns-repeated="16368" table:default-cell-style-name="ce5"/>
        <table:table-row table:style-name="ro1">
          <table:table-cell table:style-name="ce1" office:value-type="string" calcext:value-type="string">
            <text:p>Ontology Subset </text:p>
          </table:table-cell>
          <table:table-cell table:style-name="ce16" office:value-type="string" calcext:value-type="string">
            <text:p>Meta-Tag</text:p>
          </table:table-cell>
          <table:table-cell table:style-name="ce1" office:value-type="string" calcext:value-type="string">
            <text:p>Concepts</text:p>
          </table:table-cell>
          <table:table-cell table:style-name="ce20" table:number-columns-repeated="2"/>
          <table:table-cell table:number-columns-repeated="16379"/>
        </table:table-row>
        <table:table-row table:style-name="ro2">
          <table:table-cell table:style-name="ce9" office:value-type="string" calcext:value-type="string">
            <text:p>ONS</text:p>
          </table:table-cell>
          <table:table-cell table:style-name="ce7" office:value-type="string" calcext:value-type="string">
            <text:p>Edible &amp; Processed food</text:p>
          </table:table-cell>
          <table:table-cell table:style-name="ce18" office:value-type="string" calcext:value-type="string">
            <text:p><text:span text:style-name="T1">Food product </text:span><text:span text:style-name="T2"> </text:span></text:p>
            <text:p><text:span text:style-name="T1">Animal food product, </text:span></text:p>
            <text:p><text:span text:style-name="T1">animal seafood product, </text:span></text:p>
            <text:p><text:span text:style-name="T1">fish food product, </text:span></text:p>
            <text:p><text:span text:style-name="T1">fungus food product, </text:span></text:p>
            <text:p><text:span text:style-name="T1">plant food product,</text:span></text:p>
          </table:table-cell>
          <table:table-cell table:style-name="ce20" table:number-columns-repeated="2"/>
          <table:table-cell table:number-columns-repeated="16379"/>
        </table:table-row>
        <table:table-row table:style-name="ro3">
          <table:table-cell table:style-name="ce9" office:value-type="string" calcext:value-type="string">
            <text:p>ONS</text:p>
          </table:table-cell>
          <table:table-cell table:style-name="ce17" office:value-type="string" calcext:value-type="string">
            <text:p>Dietary Patterns</text:p>
          </table:table-cell>
          <table:table-cell table:style-name="ce18" office:value-type="string" calcext:value-type="string">
            <text:p><text:span text:style-name="T3">diet by food organism;</text:span></text:p>
            <text:p><text:span text:style-name="T3">vegan diet;</text:span></text:p>
            <text:p><text:span text:style-name="T3">pescetarian diet;</text:span></text:p>
            <text:p><text:span text:style-name="T3">non-pork diet;</text:span></text:p>
            <text:p><text:span text:style-name="T3">prescribed diet;</text:span></text:p>
            <text:p><text:span text:style-name="T3">halal diet; Diet;</text:span></text:p>
            <text:p><text:span text:style-name="T3">clinically prescribed diet;</text:span></text:p>
            <text:p><text:span text:style-name="T3">diet by nutritonal composition;  </text:span></text:p>
            <text:p><text:span text:style-name="T3">DASH diet;  </text:span></text:p>
            <text:p><text:span text:style-name="T3">gluten free diet:  </text:span></text:p>
            <text:p><text:span text:style-name="T3">ketogenic diet;   </text:span></text:p>
            <text:p><text:span text:style-name="T3">Low-carbohydrate, high-protien, high fat diet;  </text:span></text:p>
            <text:p><text:span text:style-name="T3">Rural diet.</text:span></text:p>
          </table:table-cell>
          <table:table-cell table:style-name="ce20" table:number-columns-repeated="2"/>
          <table:table-cell table:number-columns-repeated="16379"/>
        </table:table-row>
        <table:table-row table:style-name="ro4">
          <table:table-cell table:style-name="ce9" office:value-type="string" calcext:value-type="string">
            <text:p>OccO</text:p>
          </table:table-cell>
          <table:table-cell table:style-name="ce17" office:value-type="string" calcext:value-type="string">
            <text:p>Nutritional_based_dietary_pattern</text:p>
          </table:table-cell>
          <table:table-cell table:style-name="ce18" office:value-type="string" calcext:value-type="string">
            <text:p><text:span text:style-name="T3">diet by nutritonal composition;  </text:span></text:p>
            <text:p><text:span text:style-name="T3">DASH diet;  </text:span></text:p>
            <text:p><text:span text:style-name="T3">gluten free diet:  </text:span></text:p>
            <text:p><text:span text:style-name="T3">ketogenic diet;   </text:span></text:p>
          </table:table-cell>
          <table:table-cell table:style-name="ce20" table:number-columns-repeated="2"/>
          <table:table-cell table:number-columns-repeated="16379"/>
        </table:table-row>
        <table:table-row table:style-name="ro4">
          <table:table-cell table:style-name="ce9" office:value-type="string" calcext:value-type="string">
            <text:p>OccO</text:p>
          </table:table-cell>
          <table:table-cell table:style-name="ce17" office:value-type="string" calcext:value-type="string">
            <text:p>Food_source_restriction_dietary_pattern</text:p>
          </table:table-cell>
          <table:table-cell table:style-name="ce18" office:value-type="string" calcext:value-type="string">
            <text:p><text:span text:style-name="T3">vegan diet;</text:span></text:p>
            <text:p><text:span text:style-name="T3">pescetarian diet;</text:span></text:p>
            <text:p><text:span text:style-name="T3">non-pork diet;</text:span></text:p>
            <text:p><text:span text:style-name="T3">gluten free diet: </text:span></text:p>
          </table:table-cell>
          <table:table-cell table:style-name="ce20" table:number-columns-repeated="2"/>
          <table:table-cell table:number-columns-repeated="16379"/>
        </table:table-row>
        <table:table-row table:style-name="ro5" table:number-rows-repeated="1048570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napurna SIL" svg:font-family="'Annapurna SIL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 style:data-style-name="N2" text:time-value="16:43:32.5163965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9T01:03:23.236408892</meta:creation-date>
    <meta:generator>LibreOffice/24.2.7.2$Linux_X86_64 LibreOffice_project/420$Build-2</meta:generator>
    <dc:date>2026-06-09T20:51:49.381732912</dc:date>
    <meta:editing-duration>P1DT37M57S</meta:editing-duration>
    <meta:editing-cycles>23</meta:editing-cycles>
    <meta:document-statistic meta:table-count="1" meta:cell-count="15" meta:object-count="0"/>
  </office:meta>
</office:document-meta>
</file>